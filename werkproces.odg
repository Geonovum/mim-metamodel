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cm" svg:stroke-color="#ff6600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3333ff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6600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ff6600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cm" svg:height="1.1cm" svg:x="8.796cm" svg:y="-2.5cm">
          <text:p text:style-name="P1"><text:span text:style-name="T1">1. 'Backlog' issue</text:span></text:p>
        </draw:rect>
        <draw:custom-shape draw:style-name="gr2" draw:text-style-name="P2" xml:id="id1" draw:id="id1" draw:layer="layout" svg:width="4.8cm" svg:height="2.987cm" svg:x="8.281cm" svg:y="4.013cm">
          <text:p text:style-name="P2"><text:span text:style-name="T1">4. Moet</text:span><text:span text:style-name="T1"><text:line-break/></text:span><text:span text:style-name="T1">het worden </text:span><text:span text:style-name="T1"><text:line-break/></text:span><text:span text:style-name="T1">opgepakt ter</text:span><text:span text:style-name="T1"><text:line-break/></text:span><text:span text:style-name="T1">verwerk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xml:id="id2" draw:id="id2" draw:layer="layout" svg:width="3.9cm" svg:height="1.1cm" svg:x="8.656cm" svg:y="27.98cm">
          <text:p text:style-name="P1"><text:span text:style-name="T1">13. Naar 'Done'</text:span></text:p>
        </draw:rect>
        <draw:connector draw:style-name="gr1" draw:text-style-name="P2" draw:layer="layout" draw:line-skew="4.4cm" svg:x1="13.081cm" svg:y1="5.507cm" svg:x2="12.556cm" svg:y2="28.53cm" draw:start-shape="id1" draw:start-glue-point="7" draw:end-shape="id2" svg:d="M13081 5507h4926v23023h-5451">
          <text:p text:style-name="P1"><text:span text:style-name="T1"/></text:p>
          <text:p text:style-name="P1"><text:span text:style-name="T1"/></text:p>
          <text:p text:style-name="P1"><text:span text:style-name="T1">Nee <text:s text:c="24"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</draw:connector>
        <draw:custom-shape draw:style-name="gr2" draw:text-style-name="P2" xml:id="id3" draw:id="id3" draw:layer="layout" svg:width="5.102cm" svg:height="3.335cm" draw:transform="skewX (0.0277507351067046) rotate (0.0083775804095712) translate (8.136cm 7.594cm)">
          <text:p text:style-name="P2"><text:span text:style-name="T1">5. Is het</text:span><text:span text:style-name="T1"><text:line-break/></text:span><text:span text:style-name="T1">een Uitleg of </text:span><text:span text:style-name="T1"><text:line-break/></text:span><text:span text:style-name="T1">Begrippenmodel</text:span><text:span text:style-name="T1"><text:line-break/></text:span><text:span text:style-name="T1">issue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xml:id="id4" draw:id="id4" draw:layer="layout" svg:width="4.7cm" svg:height="1.1cm" svg:x="8.271cm" svg:y="11.82cm">
          <text:p text:style-name="P1"><text:span text:style-name="T1">6. Naar 'In progress</text:span><text:span text:style-name="T1"><text:line-break/></text:span><text:span text:style-name="T1">Uitleg/Begrippenmodel'</text:span></text:p>
        </draw:rect>
        <draw:connector draw:style-name="gr1" draw:text-style-name="P2" draw:layer="layout" svg:x1="10.624cm" svg:y1="10.905cm" svg:x2="10.621cm" svg:y2="11.82cm" draw:start-shape="id3" draw:start-glue-point="6" draw:end-shape="id4" draw:end-glue-point="0" svg:d="M10624 10905v460h-3v455">
          <text:p text:style-name="P1"><text:span text:style-name="T1"><text:s text:c="6"/></text:span><text:span text:style-name="T1">Ja</text:span></text:p>
        </draw:connector>
        <draw:custom-shape draw:style-name="gr2" draw:text-style-name="P2" xml:id="id5" draw:id="id5" draw:layer="layout" svg:width="4.372cm" svg:height="3.302cm" svg:x="8.428cm" svg:y="13.659cm">
          <text:p text:style-name="P1"><text:span text:style-name="T1">7. Is het</text:span><text:span text:style-name="T1"><text:line-break/></text:span><text:span text:style-name="T1">een Metamodel</text:span><text:span text:style-name="T1"><text:line-break/></text:span><text:span text:style-name="T1">issue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2" draw:layer="layout" svg:x1="10.621cm" svg:y1="12.92cm" svg:x2="10.614cm" svg:y2="13.659cm" draw:start-shape="id4" draw:start-glue-point="2" draw:end-shape="id5" draw:end-glue-point="4" svg:d="M10621 12920v370h-7v369">
          <text:p text:style-name="P1"><text:span text:style-name="T1">Afgehandeld <text:s text:c="23"/></text:span></text:p>
        </draw:connector>
        <draw:connector draw:style-name="gr1" draw:text-style-name="P2" draw:layer="layout" draw:line-skew="2.265cm" svg:x1="13.15cm" svg:y1="9.216cm" svg:x2="12.8cm" svg:y2="15.31cm" svg:d="M13150 9216h2795v6094h-3145">
          <text:p text:style-name="P1"><text:span text:style-name="T1">Ne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</draw:connector>
        <draw:custom-shape draw:style-name="gr2" draw:text-style-name="P2" xml:id="id7" draw:id="id7" draw:layer="layout" svg:width="3.972cm" svg:height="2.6cm" svg:x="8.628cm" svg:y="19.521cm">
          <text:p text:style-name="P1"><text:span text:style-name="T1">9. Is het</text:span><text:span text:style-name="T1"><text:line-break/></text:span><text:span text:style-name="T1">een Best practice</text:span><text:span text:style-name="T1"><text:line-break/></text:span><text:span text:style-name="T1">issue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xml:id="id6" draw:id="id6" draw:layer="layout" svg:width="4.4cm" svg:height="1.1cm" svg:x="8.4cm" svg:y="17.611cm">
          <text:p text:style-name="P1"><text:span text:style-name="T1">8. Naar 'In progress</text:span><text:span text:style-name="T1"><text:line-break/></text:span><text:span text:style-name="T1">Metamodel'</text:span></text:p>
        </draw:rect>
        <draw:connector draw:style-name="gr1" draw:text-style-name="P2" draw:layer="layout" svg:x1="10.614cm" svg:y1="16.961cm" svg:x2="10.6cm" svg:y2="17.611cm" draw:start-shape="id5" draw:start-glue-point="6" draw:end-shape="id6" draw:end-glue-point="0" svg:d="M10614 16961v326h-14v324">
          <text:p text:style-name="P1"><text:span text:style-name="T1"><text:s text:c="6"/></text:span><text:span text:style-name="T1">Ja</text:span></text:p>
        </draw:connector>
        <draw:connector draw:style-name="gr1" draw:text-style-name="P2" draw:layer="layout" svg:x1="10.6cm" svg:y1="18.711cm" svg:x2="10.614cm" svg:y2="19.521cm" draw:start-shape="id6" draw:start-glue-point="2" draw:end-shape="id7" draw:end-glue-point="4" svg:d="M10600 18711v405h14v405">
          <text:p text:style-name="P1"><text:span text:style-name="T1"><text:s text:c="25"/></text:span><text:span text:style-name="T1">Afgehandeld!</text:span></text:p>
        </draw:connector>
        <draw:connector draw:style-name="gr1" draw:text-style-name="P2" draw:layer="layout" draw:line-skew="-0.627cm" svg:x1="8.428cm" svg:y1="15.31cm" svg:x2="8.628cm" svg:y2="20.821cm" draw:start-shape="id5" draw:start-glue-point="5" draw:end-shape="id7" draw:end-glue-point="5" svg:d="M8428 15310h-1152v5511h1352">
          <text:p text:style-name="P1"><text:span text:style-name="T1"/></text:p>
          <text:p text:style-name="P1"><text:span text:style-name="T1"/></text:p>
          <text:p text:style-name="P1"><text:span text:style-name="T1">Ne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</draw:connector>
        <draw:rect draw:style-name="gr1" draw:text-style-name="P2" xml:id="id9" draw:id="id9" draw:layer="layout" svg:width="4.4cm" svg:height="1.9cm" svg:x="1cm" svg:y="27.58cm">
          <text:p text:style-name="P1"><text:span text:style-name="T1">12. Creëer PR en </text:span><text:span text:style-name="T1"><text:line-break/></text:span><text:span text:style-name="T1">plaats deze in </text:span><text:span text:style-name="T1"><text:line-break/></text:span><text:span text:style-name="T1">'In review (PR's)'</text:span></text:p>
        </draw:rect>
        <draw:custom-shape draw:style-name="gr2" draw:text-style-name="P2" xml:id="id8" draw:id="id8" draw:layer="layout" svg:width="3.819cm" svg:height="2.5cm" svg:x="1.3cm" svg:y="24.176cm">
          <text:p text:style-name="P1"><text:span text:style-name="T1">11. Is PR nodi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271cm" svg:y1="12.37cm" svg:x2="3.21cm" svg:y2="24.176cm" draw:start-shape="id4" draw:start-glue-point="3" draw:end-shape="id8" draw:end-glue-point="4" svg:d="M8271 12370h-5061v11806">
          <text:p/>
        </draw:connector>
        <draw:connector draw:style-name="gr4" draw:text-style-name="P1" draw:layer="layout" svg:x1="10.696cm" svg:y1="-1.4cm" svg:x2="10.706cm" svg:y2="-0.687cm" svg:d="M10696-1400v357h10v356">
          <text:p/>
        </draw:connector>
        <draw:connector draw:style-name="gr5" draw:text-style-name="P2" draw:layer="layout" svg:x1="5.4cm" svg:y1="28.53cm" svg:x2="8.656cm" svg:y2="28.53cm" draw:start-shape="id9" draw:start-glue-point="1" draw:end-shape="id2" svg:d="M5400 28530h3256">
          <text:p text:style-name="P1"><text:span text:style-name="T1">Afgehandeld</text:span><text:span text:style-name="T1"><text:line-break/></text:span><text:span text:style-name="T1"><text:line-break/></text:span><text:span text:style-name="T1"/></text:p>
        </draw:connector>
        <draw:connector draw:style-name="gr5" draw:text-style-name="P2" draw:layer="layout" svg:x1="3.21cm" svg:y1="26.676cm" svg:x2="3.2cm" svg:y2="27.58cm" draw:start-shape="id8" draw:start-glue-point="6" draw:end-shape="id9" draw:end-glue-point="0" svg:d="M3210 26676v453h-10v451">
          <text:p text:style-name="P1"><text:span text:style-name="T1"><text:s text:c="6"/></text:span><text:span text:style-name="T1">Ja</text:span><text:span text:style-name="T1"><text:line-break/></text:span><text:span text:style-name="T1"/></text:p>
        </draw:connector>
        <draw:connector draw:style-name="gr1" draw:text-style-name="P2" draw:layer="layout" svg:x1="5.119cm" svg:y1="25.426cm" svg:x2="10.734cm" svg:y2="25.423cm" draw:start-shape="id8" draw:start-glue-point="7" draw:end-shape="id10" draw:end-glue-point="3" svg:d="M5119 25426h2820v-3h2795">
          <text:p text:style-name="P2">Nee <text:s text:c="32"/><text:line-break/><text:line-break/></text:p>
        </draw:connector>
        <draw:rect draw:style-name="gr1" draw:text-style-name="P2" xml:id="id11" draw:id="id11" draw:layer="layout" svg:width="4.198cm" svg:height="1.1cm" draw:transform="skewX (0.001745329251994) translate (8.502cm 22.86cm)">
          <text:p text:style-name="P1"><text:span text:style-name="T1">10. Naar 'In progress</text:span><text:span text:style-name="T1"><text:line-break/></text:span><text:span text:style-name="T1">Best practice'</text:span></text:p>
        </draw:rect>
        <draw:connector draw:style-name="gr1" draw:text-style-name="P2" draw:layer="layout" svg:x1="10.614cm" svg:y1="22.121cm" svg:x2="10.601cm" svg:y2="22.86cm" draw:start-shape="id7" draw:start-glue-point="6" draw:end-shape="id11" draw:end-glue-point="0" svg:d="M10614 22121v370h-13v369">
          <text:p text:style-name="P1"><text:span text:style-name="T1"><text:s text:c="6"/></text:span><text:span text:style-name="T1">Ja</text:span></text:p>
        </draw:connector>
        <draw:connector draw:style-name="gr1" draw:text-style-name="P1" draw:layer="layout" svg:x1="10.599cm" svg:y1="23.96cm" svg:x2="10.606cm" svg:y2="27.98cm" draw:start-shape="id11" draw:start-glue-point="2" draw:end-shape="id2" draw:end-glue-point="0" svg:d="M10599 23960v2010h7v2010">
          <text:p text:style-name="P1"><text:line-break/><text:line-break/><text:line-break/><text:span text:style-name="T1"> <text:s text:c="22"/></text:span><text:span text:style-name="T1">Afgehandeld</text:span><text:line-break/><text:line-break/><text:line-break/><text:line-break/><text:line-break/><text:line-break/><text:line-break/></text:p>
        </draw:connector>
        <draw:connector draw:style-name="gr6" draw:text-style-name="P1" draw:layer="layout" svg:x1="8.5cm" svg:y1="23.41cm" svg:x2="3.21cm" svg:y2="24.176cm" draw:start-shape="id11" draw:start-glue-point="3" draw:end-shape="id8" draw:end-glue-point="4" svg:d="M8500 23410h-5290v766">
          <text:p/>
        </draw:connector>
        <draw:connector draw:style-name="gr6" draw:text-style-name="P1" draw:layer="layout" svg:x1="8.4cm" svg:y1="18.161cm" svg:x2="3.21cm" svg:y2="24.176cm" draw:start-shape="id6" draw:start-glue-point="3" draw:end-shape="id8" draw:end-glue-point="4" svg:d="M8400 18161h-5190v6015">
          <text:p/>
        </draw:connector>
        <draw:connector draw:style-name="gr1" draw:text-style-name="P2" xml:id="id10" draw:id="id10" draw:layer="layout" draw:line-skew="0.975cm" svg:x1="12.6cm" svg:y1="20.821cm" svg:x2="10.734cm" svg:y2="25.423cm" svg:d="M12600 20821h1500v4602h-3366">
          <text:p text:style-name="P1"><text:span text:style-name="T1"><text:line-break/></text:span><text:span text:style-name="T1"> <text:s text:c="16"/></text:span><text:span text:style-name="T1">Ne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</draw:connector>
        <draw:custom-shape draw:style-name="gr2" draw:text-style-name="P2" xml:id="id13" draw:id="id13" draw:layer="layout" svg:width="4.5cm" svg:height="2.5cm" svg:x="8.438cm" svg:y="-0.8cm">
          <text:p text:style-name="P2"><text:span text:style-name="T1">2. Moet het</text:span><text:span text:style-name="T1"><text:line-break/></text:span><text:span text:style-name="T1">besproken</text:span><text:span text:style-name="T1"><text:line-break/></text:span><text:span text:style-name="T1">word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2" draw:layer="layout" svg:x1="10.681cm" svg:y1="7cm" svg:x2="10.688cm" svg:y2="7.569cm" draw:start-shape="id1" draw:start-glue-point="6" draw:end-shape="id3" draw:end-glue-point="4" svg:d="M10681 7000v286h7v283">
          <text:p text:style-name="P1"><text:span text:style-name="T1"><text:s text:c="6"/></text:span><text:span text:style-name="T1">Ja</text:span></text:p>
        </draw:connector>
        <draw:rect draw:style-name="gr1" draw:text-style-name="P2" xml:id="id12" draw:id="id12" draw:layer="layout" svg:width="4.7cm" svg:height="1.1cm" svg:x="8.338cm" svg:y="2.248cm">
          <text:p text:style-name="P1"><text:span text:style-name="T1">3. Naar 'In progress</text:span><text:span text:style-name="T1"><text:line-break/></text:span><text:span text:style-name="T1">Bespreekissues'</text:span></text:p>
        </draw:rect>
        <draw:connector draw:style-name="gr1" draw:text-style-name="P2" draw:layer="layout" svg:x1="10.688cm" svg:y1="3.348cm" svg:x2="10.681cm" svg:y2="4.013cm" draw:start-shape="id12" draw:start-glue-point="2" draw:end-shape="id1" draw:end-glue-point="4" svg:d="M10688 3348v332h-7v333">
          <text:p text:style-name="P1"><text:span text:style-name="T1"><text:s text:c="30"/></text:span><text:span text:style-name="T1">Uitbediscusieerd</text:span></text:p>
        </draw:connector>
        <draw:connector draw:style-name="gr1" draw:text-style-name="P2" draw:layer="layout" svg:x1="10.688cm" svg:y1="1.7cm" svg:x2="10.688cm" svg:y2="2.248cm" draw:start-shape="id13" draw:start-glue-point="6" draw:end-shape="id12" draw:end-glue-point="0" svg:d="M10688 1700v548">
          <text:p text:style-name="P1"><text:span text:style-name="T1"><text:s text:c="7"/></text:span><text:span text:style-name="T1">Ja</text:span></text:p>
        </draw:connector>
        <draw:connector draw:style-name="gr1" draw:text-style-name="P2" draw:layer="layout" draw:line-skew="-1.156cm" svg:x1="8.438cm" svg:y1="0.45cm" svg:x2="8.281cm" svg:y2="5.506cm" draw:start-shape="id13" draw:start-glue-point="5" draw:end-shape="id1" svg:d="M8438 450h-1838v5056h1681">
          <text:p text:style-name="P1"><text:span text:style-name="T1">Ne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3333ff" draw:marker-start-width="0.28cm" draw:marker-start-center="false" draw:marker-end="Arrow" draw:marker-end-width="0.2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Melskens</meta:initial-creator>
    <meta:creation-date>2025-11-12T10:47:51.72</meta:creation-date>
    <dc:date>2026-05-22T14:34:43.09</dc:date>
    <dc:creator>Robert Melskens</dc:creator>
    <meta:editing-duration>PT1H26M5S</meta:editing-duration>
    <meta:editing-cycles>6</meta:editing-cycles>
    <meta:generator>OpenOffice/4.1.15$Win32 OpenOffice.org_project/4115m2$Build-9813</meta:generator>
    <meta:document-statistic meta:object-count="34"/>
  </office:meta>
</office:document-meta>
</file>